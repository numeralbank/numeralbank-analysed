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6.015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1.875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427cm"/>
    </style:style>
    <style:style style:name="co7" style:family="table-column">
      <style:table-column-properties fo:break-before="auto" style:column-width="2.81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3.616cm"/>
    </style:style>
    <style:style style:name="co10" style:family="table-column">
      <style:table-column-properties fo:break-before="auto" style:column-width="1.048cm"/>
    </style:style>
    <style:style style:name="co11" style:family="table-column">
      <style:table-column-properties fo:break-before="auto" style:column-width="2.406cm"/>
    </style:style>
    <style:style style:name="co12" style:family="table-column">
      <style:table-column-properties fo:break-before="auto" style:column-width="13.998cm"/>
    </style:style>
    <style:style style:name="co13" style:family="table-column">
      <style:table-column-properties fo:break-before="auto" style:column-width="2.74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A043_numerals-paco1243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anguage_I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arameter_ID</text:p>
          </table:table-cell>
          <table:table-cell office:value-type="string" calcext:value-type="string">
            <text:p>Number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ment_contributo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Comment_glosser</text:p>
          </table:table-cell>
          <table:table-cell office:value-type="string" calcext:value-type="string">
            <text:p>Alternate_gl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erals-paco1243-1-one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:j</text:p>
          </table:table-cell>
          <table:table-cell office:value-type="string" calcext:value-type="string">
            <text:p>muj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merals-paco1243-1-one-2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ɤh</text:p>
          </table:table-cell>
          <table:table-cell office:value-type="string" calcext:value-type="string">
            <text:p>muh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erals-paco1243-1-two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ːr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erals-paco1243-1-three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r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ɛː</text:p>
          </table:table-cell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merals-paco1243-1-four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ṵan</text:p>
          </table:table-cell>
          <table:table-cell office:value-type="string" calcext:value-type="string">
            <text:p>puan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merals-paco1243-1-five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ːŋ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merals-paco1243-1-six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'pat</text:p>
          </table:table-cell>
          <table:table-cell office:value-type="string" calcext:value-type="string">
            <text:p>tupat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erals-paco1243-1-sev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ev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'pṵːl</text:p>
          </table:table-cell>
          <table:table-cell office:value-type="string" calcext:value-type="string">
            <text:p>tupul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merals-paco1243-1-eight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ig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'kɔːl</text:p>
          </table:table-cell>
          <table:table-cell office:value-type="string" calcext:value-type="string">
            <text:p>tikol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merals-paco1243-1-nine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n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'kḭah</text:p>
          </table:table-cell>
          <table:table-cell office:value-type="string" calcext:value-type="string">
            <text:p>tikiah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umerals-paco1243-1-t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'cit</text:p>
          </table:table-cell>
          <table:table-cell office:value-type="string" calcext:value-type="string">
            <text:p>mu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⋅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umerals-paco1243-1-ten-2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ɤh cit</text:p>
          </table:table-cell>
          <table:table-cell office:value-type="string" calcext:value-type="string">
            <text:p>muh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[⋅]1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merals-paco1243-1-elev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lev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ː cit la muːj</text:p>
          </table:table-cell>
          <table:table-cell office:value-type="string" calcext:value-type="string">
            <text:p>mucitlamuj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1[⋅]10)+{+}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merals-paco1243-1-twelve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l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ː cit la baːr</text:p>
          </table:table-cell>
          <table:table-cell office:value-type="string" calcext:value-type="string">
            <text:p>mucitlaba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1[⋅]10)+{+}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merals-paco1243-1-thirte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irte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ː cit la pɛː</text:p>
          </table:table-cell>
          <table:table-cell office:value-type="string" calcext:value-type="string">
            <text:p>mucitlap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1[⋅]10)+{+}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merals-paco1243-1-fourte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urte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ː cit la pṵan</text:p>
          </table:table-cell>
          <table:table-cell office:value-type="string" calcext:value-type="string">
            <text:p>mucitlapuan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1[⋅]10)+{+}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merals-paco1243-1-fifte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ifte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ː cit la soːŋ</text:p>
          </table:table-cell>
          <table:table-cell office:value-type="string" calcext:value-type="string">
            <text:p>mucitlasong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1[⋅]10)+{+}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umerals-paco1243-1-sixte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ixte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ː cit la tu'pat</text:p>
          </table:table-cell>
          <table:table-cell office:value-type="string" calcext:value-type="string">
            <text:p>mucitlatupa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1[⋅]10)+{+}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umerals-paco1243-1-sevente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event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ː cit la tu'pṵːl</text:p>
          </table:table-cell>
          <table:table-cell office:value-type="string" calcext:value-type="string">
            <text:p>mucitlatupul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1[⋅]10)+{+}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umerals-paco1243-1-eighte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ight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ː cit la ti'kɔːl</text:p>
          </table:table-cell>
          <table:table-cell office:value-type="string" calcext:value-type="string">
            <text:p>mucitlatikol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1[⋅]10)+{+}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umerals-paco1243-1-ninete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ninete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ː cit la ti'kḭah</text:p>
          </table:table-cell>
          <table:table-cell office:value-type="string" calcext:value-type="string">
            <text:p>mucitlatikiah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1[⋅]10)+{+}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umerals-paco1243-1-twenty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ːr cit</text:p>
          </table:table-cell>
          <table:table-cell office:value-type="string" calcext:value-type="string">
            <text:p>bar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[⋅]1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umerals-paco1243-1-twentyone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ːr cit la muːj</text:p>
          </table:table-cell>
          <table:table-cell office:value-type="string" calcext:value-type="string">
            <text:p>barcitlamuj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2[⋅]10)+{+}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umerals-paco1243-1-twentytwo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tw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ːr cit la baːr</text:p>
          </table:table-cell>
          <table:table-cell office:value-type="string" calcext:value-type="string">
            <text:p>barcitlaba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2[⋅]10)+{+}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umerals-paco1243-1-twentythree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thre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ːr cit la pɛː</text:p>
          </table:table-cell>
          <table:table-cell office:value-type="string" calcext:value-type="string">
            <text:p>barcitlap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2[⋅]10)+{+}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umerals-paco1243-1-twentyfour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fou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ːr cit la pṵan</text:p>
          </table:table-cell>
          <table:table-cell office:value-type="string" calcext:value-type="string">
            <text:p>barcitlapuan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2[⋅]10)+{+}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umerals-paco1243-1-twentyfive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fiv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ːr cit la soːŋ</text:p>
          </table:table-cell>
          <table:table-cell office:value-type="string" calcext:value-type="string">
            <text:p>barcitlasong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2[⋅]10)+{+}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umerals-paco1243-1-twentysix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si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ːr cit la tu'pat</text:p>
          </table:table-cell>
          <table:table-cell office:value-type="string" calcext:value-type="string">
            <text:p>barcitlatupa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2[⋅]10)+{+}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umerals-paco1243-1-twentyseven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sev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ːr cit la tu'pṵːl</text:p>
          </table:table-cell>
          <table:table-cell office:value-type="string" calcext:value-type="string">
            <text:p>barcitlatupul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2[⋅]10)+{+}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umerals-paco1243-1-twentyeight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eigh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ːr cit la ti'kɔːl</text:p>
          </table:table-cell>
          <table:table-cell office:value-type="string" calcext:value-type="string">
            <text:p>barcitlatikol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2[⋅]10)+{+}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umerals-paco1243-1-twentynine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n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ːr cit la ti'kḭah</text:p>
          </table:table-cell>
          <table:table-cell office:value-type="string" calcext:value-type="string">
            <text:p>barcitlatikiah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(2[⋅]10)+{+}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umerals-paco1243-1-thirty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ir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ɛː cit</text:p>
          </table:table-cell>
          <table:table-cell office:value-type="string" calcext:value-type="string">
            <text:p>pe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3[⋅]1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merals-paco1243-1-forty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r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ṵan cit</text:p>
          </table:table-cell>
          <table:table-cell office:value-type="string" calcext:value-type="string">
            <text:p>puan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4[⋅]1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merals-paco1243-1-fifty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if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ːŋ cit</text:p>
          </table:table-cell>
          <table:table-cell office:value-type="string" calcext:value-type="string">
            <text:p>song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5[⋅]1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merals-paco1243-1-sixty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ixt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u'pat cit</text:p>
          </table:table-cell>
          <table:table-cell office:value-type="string" calcext:value-type="string">
            <text:p>tupat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6[⋅]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umerals-paco1243-1-seventy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event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u'pṵːl cit</text:p>
          </table:table-cell>
          <table:table-cell office:value-type="string" calcext:value-type="string">
            <text:p>tupul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7[⋅]1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umerals-paco1243-1-eighty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ight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'kɔːlcit</text:p>
          </table:table-cell>
          <table:table-cell office:value-type="string" calcext:value-type="string">
            <text:p>tikol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8[⋅]1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umerals-paco1243-1-ninety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nine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'kḭah cit</text:p>
          </table:table-cell>
          <table:table-cell office:value-type="string" calcext:value-type="string">
            <text:p>tikiahci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9[⋅]1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umerals-paco1243-1-hundred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hundr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ɤh ku'lam</text:p>
          </table:table-cell>
          <table:table-cell office:value-type="string" calcext:value-type="string">
            <text:p>muhkulam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[⋅]1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umerals-paco1243-1-twohundred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ohundr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ːr ku'lam</text:p>
          </table:table-cell>
          <table:table-cell office:value-type="string" calcext:value-type="string">
            <text:p>barkulam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[⋅]10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umerals-paco1243-1-thousand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ous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ɤh ŋiːn</text:p>
          </table:table-cell>
          <table:table-cell office:value-type="string" calcext:value-type="string">
            <text:p>muhngin</text:p>
          </table:table-cell>
          <table:table-cell office:value-type="string" calcext:value-type="string">
            <text:p>( ŋiːn &lt; Vietnamese 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[⋅]1000</text:p>
          </table:table-cell>
          <table:table-cell office:value-type="string" calcext:value-type="string">
            <text:p>According to the contributor, the form for thousand ‘ŋiːn’ is borrowed from Vietnamese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umerals-paco1243-1-twothousand-1</text:p>
          </table:table-cell>
          <table:table-cell office:value-type="string" calcext:value-type="string">
            <text:p>numerals-paco1243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othousan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ːr ŋiːn</text:p>
          </table:table-cell>
          <table:table-cell office:value-type="string" calcext:value-type="string">
            <text:p>barngin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[⋅]1000</text:p>
          </table:table-cell>
          <table:table-cell office:value-type="string" calcext:value-type="string">
            <text:p>According to the contributor, the form for thousand ‘ŋiːn’ is borrowed from Vietnames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7-02T09:16:13.118537000</dc:date>
    <meta:editing-duration>PT2M9S</meta:editing-duration>
    <meta:editing-cycles>1</meta:editing-cycles>
    <meta:document-statistic meta:table-count="1" meta:cell-count="435" meta:object-count="0"/>
    <meta:generator>LibreOffice/25.2.7.2$Windows_X86_64 LibreOffice_project/5cbfd1ab6520636bb5f7b99185aa69bd7456825d</meta:generator>
  </office:meta>
</office:document-meta>
</file>